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4B85C66177.png" manifest:media-type="image/png"/>
  <manifest:file-entry manifest:full-path="Pictures/100024340000042200000422FCC62A4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outline1">
      <style:graphic-properties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Securing Your Accounts:</text:span></text:p>
            <text:p><text:span text:style-name="T1">2FA, Passkeys, and</text:span></text:p>
            <text:p><text:span text:style-name="T1">Security Tokens</text:span></text:p>
            <text:p><text:span text:style-name="T1"/></text:p>
            <text:p text:style-name="P1"><text:span text:style-name="T2"/></text:p>
            <text:p text:style-name="P1"><text:span text:style-name="T2">CUCUG</text:span></text:p>
            <text:p text:style-name="P1"><text:span text:style-name="T2">Quentin Barnes</text:span></text:p>
            <text:p text:style-name="P1"><text:span text:style-name="T2">January 15, 2026</text:span></text:p>
          </draw:text-box>
        </draw:frame>
        <draw:frame draw:style-name="gr1" draw:text-style-name="P3" draw:layer="layout" svg:width="4cm" svg:height="4cm" svg:x="23.305cm" svg:y="11.24cm">
          <draw:image xlink:href="Pictures/100024340000042200000422FCC62A4B.svg" xlink:type="simple" xlink:show="embed" xlink:actuate="onLoad" draw:mime-type="image/svg+xml">
            <text:p/>
          </draw:image>
          <draw:image xlink:href="Pictures/100000010000004B0000004B85C66177.png" xlink:type="simple" xlink:show="embed" xlink:actuate="onLoad" draw:mime-type="image/png"/>
          <loext:qrcode office:string-value="https://github.com/qbarnes/cucug_presentations/blob/master/SecuringAccounts-20260115/SecuringAccounts.pdf" loext:qrcode-errorcorrection="low" loext:qrcode-border="1" loext:qrcode-type="0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’Tis a Bal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curity is a balance between</text:p>
                <text:list>
                  <text:list-item>
                    <text:p>Authenticating only authorized users</text:p>
                  </text:list-item>
                  <text:list-item>
                    <text:p>Usability headaches and annoying those users</text:p>
                  </text:list-item>
                </text:list>
              </text:list-item>
              <text:list-item>
                <text:p>Logins with passwords used to be adequate</text:p>
                <text:list>
                  <text:list-item>
                    <text:p>Even then, <text:a xlink:href="https://github.com/qbarnes/cucug_presentations/blob/master/PasswordHygiene-20250717/PasswordHygiene.pdf" xlink:type="simple">password hygiene</text:a><text:s/>was still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ssword Weaknes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:</text:p>
                <text:list>
                  <text:list-item>
                    <text:p><text:a xlink:href="https://en.wikipedia.org/wiki/Password#Password_reuse" xlink:type="simple">Reused</text:a></text:p>
                  </text:list-item>
                  <text:list-item>
                    <text:p><text:a xlink:href="https://en.wikipedia.org/wiki/Password_cracking" xlink:type="simple">Guessed or cracked</text:a></text:p>
                  </text:list-item>
                  <text:list-item>
                    <text:p><text:a xlink:href="https://en.wikipedia.org/wiki/Spoofing_attack" xlink:type="simple">Spoofed</text:a><text:s/>or <text:a xlink:href="https://en.wikipedia.org/wiki/Phishing" xlink:type="simple">phished</text:a></text:p>
                  </text:list-item>
                  <text:list-item>
                    <text:p>Lost or forgotten</text:p>
                  </text:list-item>
                </text:list>
              </text:list-item>
              <text:list-item>
                <text:p><text:a xlink:href="https://en.wikipedia.org/wiki/Password_manager" xlink:type="simple">Password managers</text:a><text:s/><text:span text:style-name="T3">can help w</text:span>ith all of the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ddressing Shortcoming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Multi-factor_authentication" xlink:type="simple">2FA/MFA</text:a><text:s/>(2/Multi-factor authentication)</text:p>
              </text:list-item>
              <text:list-item>
                <text:p><text:a xlink:href="https://en.wikipedia.org/wiki/WebAuthn#Passkey_branding" xlink:type="simple">Passkeys</text:a></text:p>
              </text:list-item>
              <text:list-item>
                <text:p><text:a xlink:href="https://en.wikipedia.org/wiki/Software_token" xlink:type="simple">Software tokens</text:a><text:s/>(<text:a xlink:href="https://en.wikipedia.org/wiki/Time-based_one-time_password" xlink:type="simple">TOTP</text:a> authenticator apps)</text:p>
              </text:list-item>
              <text:list-item>
                <text:p>Hardware <text:a xlink:href="https://en.wikipedia.org/wiki/Security_token" xlink:type="simple">security tokens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ulti-factor Authentic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s two or more “factors”:</text:p>
                <text:list>
                  <text:list-item>
                    <text:p>Something you know</text:p>
                    <text:list>
                      <text:list-item>
                        <text:p>Password, PIN, security question</text:p>
                      </text:list-item>
                    </text:list>
                  </text:list-item>
                  <text:list-item>
                    <text:p>Something you have</text:p>
                    <text:list>
                      <text:list-item>
                        <text:p>Phone, software/hardware token, email, smart card</text:p>
                      </text:list-item>
                    </text:list>
                  </text:list-item>
                  <text:list-item>
                    <text:p>Something you are</text:p>
                    <text:list>
                      <text:list-item>
                        <text:p>Fingerprint, face, iris, or retin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ss Common MF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sometimes include:</text:p>
                <text:list>
                  <text:list-item>
                    <text:p>Somewhere you are</text:p>
                    <text:list>
                      <text:list-item>
                        <text:p>Physical location (GPS), IP address</text:p>
                      </text:list-item>
                    </text:list>
                  </text:list-item>
                  <text:list-item>
                    <text:p>Something you do</text:p>
                    <text:list>
                      <text:list-item>
                        <text:p>Keystroke or mouse movements, ga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sskey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Passkey” is short for “<text:a xlink:href="https://en.wikipedia.org/wiki/WebAuthn" xlink:type="simple">WebAuthn</text:a> credential”</text:p>
              </text:list-item>
              <text:list-item>
                <text:p>A cryptographic key stored on client’s system</text:p>
                <text:list>
                  <text:list-item>
                    <text:p>Generated during negotiation with server’s system</text:p>
                  </text:list-item>
                </text:list>
              </text:list-item>
              <text:list-item>
                <text:p>Acts in place of login/password</text:p>
              </text:list-item>
              <text:list-item>
                <text:p><text:a xlink:href="https://www.yubico.com/resources/glossary/what-is-a-passkey/" xlink:type="simple">Two types of passkeys</text:a></text:p>
                <text:list>
                  <text:list-item>
                    <text:p>Synced (e.g. password manager)</text:p>
                  </text:list-item>
                  <text:list-item>
                    <text:p>Device-bound (e.g. hw token, Face ID, Windows Hell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sskey Advant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ch passkey is unique</text:p>
                <text:list>
                  <text:list-item>
                    <text:p>Can only be used for logging in with the site that generated it</text:p>
                  </text:list-item>
                  <text:list-item>
                    <text:p>Can’t be reused</text:p>
                  </text:list-item>
                  <text:list-item>
                    <text:p>Can’t be guessed or cracked</text:p>
                  </text:list-item>
                  <text:list-item>
                    <text:p>Can’t be spoofed or phished</text:p>
                  </text:list-item>
                </text:list>
              </text:list-item>
              <text:list-item>
                <text:p>Considered MFA</text:p>
                <text:list>
                  <text:list-item>
                    <text:p>Requires both unlocking and having the passkey’s storage device</text:p>
                  </text:list-item>
                </text:list>
              </text:list-item>
              <text:list-item>
                <text:p><text:span text:style-name="T4">Can have multiple</text:span> passkeys per site and login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sskey Disadvant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t all web sites support passkeys</text:p>
                <text:list>
                  <text:list-item>
                    <text:p>Passkeys first rolled out in 2022</text:p>
                  </text:list-item>
                  <text:list-item>
                    <text:p>Many sites use both passwords and passkeys for now</text:p>
                  </text:list-item>
                </text:list>
              </text:list-item>
              <text:list-item>
                <text:p>Requires storage device</text:p>
                <text:list>
                  <text:list-item>
                    <text:p>Browser, password manager, or hardware token</text:p>
                  </text:list-item>
                </text:list>
              </text:list-item>
              <text:list-item>
                <text:p>MFA aspect can be defeated if no authentication required for storage dev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OTP Authentic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Time-based_one-time_password" xlink:type="simple">Time-based One Time Passwords</text:a><text:s/>(TOTP)</text:p>
                <text:list>
                  <text:list-item>
                    <text:p>Generates timed-limited passwords</text:p>
                  </text:list-item>
                  <text:list-item>
                    <text:p>Often 6-8 characters long</text:p>
                  </text:list-item>
                  <text:list-item>
                    <text:p>Sequences time out, often after 20-30 seconds</text:p>
                  </text:list-item>
                </text:list>
              </text:list-item>
              <text:list-item>
                <text:p><text:a xlink:href="https://en.wikipedia.org/wiki/HMAC-based_one-time_password" xlink:type="simple">HMAC-based OTP</text:a><text:s/>(HOTP) generate single use password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OTP Authentication (cont.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<text:a xlink:href="https://en.wikipedia.org/wiki/Comparison_of_OTP_applications" xlink:type="simple">TOTP Apps</text:a></text:span><text:span text:style-name="T3"><text:s/>initialized with authenticator keys</text:span></text:p>
                <text:list>
                  <text:list-item>
                    <text:p><text:span text:style-name="T3">Authenticator keys as alphanumeric strings or QR codes</text:span></text:p>
                  </text:list-item>
                  <text:list-item>
                    <text:p><text:span text:style-name="T3"><text:a xlink:href="https://2fas.com/" xlink:type="simple">2FAS</text:a></text:span><text:span text:style-name="T3">, </text:span><text:span text:style-name="T3"><text:a xlink:href="https://authy.com/" xlink:type="simple">Authy</text:a></text:span><text:span text:style-name="T3">, </text:span><text:span text:style-name="T3"><text:a xlink:href="https://bitwarden.com/" xlink:type="simple">Bitwarden</text:a></text:span><text:span text:style-name="T3">, </text:span><text:span text:style-name="T3"><text:a xlink:href="https://en.wikipedia.org/wiki/Google_Authenticator" xlink:type="simple">Google Authenticator</text:a></text:span><text:span text:style-name="T3">, etc.</text:span></text:p>
                  </text:list-item>
                  <text:list-item>
                    <text:p><text:span text:style-name="T3">Don’t just pick a random TOTP app out of an app store!</text:span></text:p>
                  </text:list-item>
                </text:list>
              </text:list-item>
              <text:list-item>
                <text:p><text:span text:style-name="T5">Don’t</text:span> use the same app for storing both passwords and authenticator keys unless you have enabled its MFA</text:p>
                <text:list>
                  <text:list-item>
                    <text:p>Otherwise, you lose MFA secu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ardware Security Toke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kens are teeny computers. <text:s/>They can:</text:p>
                <text:list>
                  <text:list-item>
                    <text:p>Store passwords, cryptographic keys, digital signatures</text:p>
                  </text:list-item>
                  <text:list-item>
                    <text:p>Run various cryptographic algorithms</text:p>
                  </text:list-item>
                </text:list>
              </text:list-item>
              <text:list-item>
                <text:p>Portable ones may have</text:p>
                <text:list>
                  <text:list-item>
                    <text:p>USB/USB-C, Bluetooth, and/or NFC interfaces</text:p>
                  </text:list-item>
                  <text:list-item>
                    <text:p>Small, tamper resistant packaging</text:p>
                  </text:list-item>
                  <text:list-item>
                    <text:p>A screen, keypad, or bio senso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ardware Security Tokens (cont.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rious manufacturers</text:p>
                <text:list>
                  <text:list-item>
                    <text:p><text:a xlink:href="https://www.yubico.com/products/" xlink:type="simple">Yubico</text:a>, <text:a xlink:href="https://thetis.io/" xlink:type="simple">Thetis</text:a>, <text:a xlink:href="https://store.google.com/product/titan_security_key" xlink:type="simple">Google</text:a>, <text:a xlink:href="https://www.nitrokey.com/" xlink:type="simple">Nitrokey</text:a>, <text:a xlink:href="https://ftsafe.us/" xlink:type="simple">Feitian</text:a>, <text:a xlink:href="https://solokeys.com/" xlink:type="simple">SoloKeys</text:a></text:p>
                  </text:list-item>
                </text:list>
              </text:list-item>
              <text:list-item>
                <text:p>Authenticate with PIN or Bio sensor</text:p>
              </text:list-item>
              <text:list-item>
                <text:p>Want at least <text:a xlink:href="https://en.wikipedia.org/wiki/FIDO_Alliance#FIDO2" xlink:type="simple">FIDO2</text:a><text:s/>support</text:p>
              </text:list-item>
              <text:list-item>
                <text:p>Portable ones cost $18-$125</text:p>
              </text:list-item>
              <text:list-item>
                <text:p>You may already have one! (<text:a xlink:href="https://en.wikipedia.org/wiki/Trusted_Platform_Module#TPM_2.0" xlink:type="simple">fTPM</text:a>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ommend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a good <text:a xlink:href="https://en.wikipedia.org/wiki/List_of_password_managers" xlink:type="simple">password manager</text:a></text:p>
                <text:list>
                  <text:list-item>
                    <text:p>Avoid web browser’s native password manager</text:p>
                  </text:list-item>
                  <text:list-item>
                    <text:p>Recommend <text:a xlink:href="https://bitwarden.com/" xlink:type="simple">Bitwarden</text:a>; others okay, but consider limits, $$$</text:p>
                    <text:list>
                      <text:list-item>
                        <text:p>Excellent free features, open source, multi-platform</text:p>
                      </text:list-item>
                      <text:list-item>
                        <text:p>Good free tier, premium tier just $10/yr</text:p>
                      </text:list-item>
                    </text:list>
                  </text:list-item>
                  <text:list-item>
                    <text:p>Transition your login accounts into it</text:p>
                  </text:list-item>
                  <text:list-item>
                    <text:p>Replace your weak, exposed, and reused passwords</text:p>
                  </text:list-item>
                  <text:list-item>
                    <text:p>Enable Passkeys/MFA with your password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ommendations (2)</text:p>
          </draw:text-box>
        </draw:frame>
        <draw:frame presentation:style-name="pr6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Check each site for supporting passkeys <text:s/>[<text:a xlink:href="https://passkeys.2fa.directory/" xlink:type="simple">1</text:a>]</text:p>
                <text:list>
                  <text:list-item>
                    <text:p>May want to create more than one passkey</text:p>
                  </text:list-item>
                  <text:list-item>
                    <text:p>Delete your password when comfortable (optional)</text:p>
                  </text:list-item>
                </text:list>
              </text:list-item>
              <text:list-item>
                <text:p>Sites without Passkeys, use their MFA <text:s/>[<text:a xlink:href="https://2fa.directory/" xlink:type="simple">2</text:a>]</text:p>
                <text:list>
                  <text:list-item>
                    <text:p>But caution with phone numbers! (MFA vs. recovery)</text:p>
                  </text:list-item>
                  <text:list-item>
                    <text:p>Set up software or hardware tokens <text:s/>[<text:a xlink:href="https://www.dongleauth.com/" xlink:type="simple">3</text:a>]</text:p>
                  </text:list-item>
                </text:list>
              </text:list-item>
              <text:list-item>
                <text:p>If no passkeys and no MFA, consider alternate sites</text:p>
                <text:list>
                  <text:list-item>
                    <text:p>Especially for financial or otherwise important security nee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ommendations (3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cure your password manager with MFA</text:p>
                <text:list>
                  <text:list-item>
                    <text:p>Have backups of MFA keys</text:p>
                  </text:list-item>
                  <text:list-item>
                    <text:p>Consider 2+ backups and kept apart, off-site</text:p>
                    <text:list>
                      <text:list-item>
                        <text:p>Safe deposit box (as little as $20/yr), friend’s hous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7" draw:text-style-name="P5" draw:layer="layout" svg:width="25.199cm" svg:height="12.19cm" svg:x="1.4cm" svg:y="0.628cm" presentation:class="subtitle">
          <draw:text-box>
            <text:p>Questions?</text:p>
            <text:p/>
            <text:p>Demos?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hadow-color="#000000"/>
      <style:paragraph-properties fo:margin-left="0cm" fo:margin-right="0cm" fo:margin-top="0.4cm" fo:margin-bottom="0cm" fo:text-indent="0cm" loext:tab-stop-distance="0cm">
        <style:tab-stops/>
      </style:paragraph-properties>
      <style:text-properties style:use-window-font-color="true" loext:opacity="0%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14:27:22.655732062</meta:creation-date>
    <dc:date>2026-01-15T16:32:27.517296287</dc:date>
    <meta:editing-duration>P3DT22H54M27S</meta:editing-duration>
    <meta:editing-cycles>164</meta:editing-cycles>
    <meta:generator>LibreOffice/25.8.4.2$Linux_X86_64 LibreOffice_project/580$Build-2</meta:generator>
    <meta:print-date>2026-01-13T20:26:03.319480725</meta:print-date>
    <meta:printed-by>PDF files</meta:printed-by>
    <meta:document-statistic meta:object-count="88"/>
  </office:meta>
</office:document-meta>
</file>