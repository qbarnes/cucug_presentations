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C0000003C06E63C6B.png" manifest:media-type="image/png"/>
  <manifest:file-entry manifest:full-path="Pictures/100016DB0000034F0000034F9CF4A46C.svg" manifest:media-type="image/svg+xml"/>
  <manifest:file-entry manifest:full-path="Pictures/100000010000003C0000003C0DE93B56.png" manifest:media-type="image/png"/>
  <manifest:file-entry manifest:full-path="Pictures/1000174E0000034F0000034F392A9110.svg" manifest:media-type="image/svg+xml"/>
  <manifest:file-entry manifest:full-path="Pictures/100000010000003C0000003C50204547.png" manifest:media-type="image/png"/>
  <manifest:file-entry manifest:full-path="Pictures/100017A50000034F0000034FF1AF0D32.svg" manifest:media-type="image/svg+xml"/>
  <manifest:file-entry manifest:full-path="Pictures/10000000000005DC000005DAD571ABA9.jpg" manifest:media-type="image/jpeg"/>
  <manifest:file-entry manifest:full-path="Pictures/100000010000003C0000003C0360612A.png" manifest:media-type="image/png"/>
  <manifest:file-entry manifest:full-path="Pictures/100018090000034F0000034F966D8D32.svg" manifest:media-type="image/svg+xml"/>
  <manifest:file-entry manifest:full-path="Pictures/10000001000000430000004339A3319F.png" manifest:media-type="image/png"/>
  <manifest:file-entry manifest:full-path="Pictures/10001D51000003B8000003B8878BD65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034" officeooo:paragraph-rsid="000ba034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 style:parent-style-name="Standard">
      <style:paragraph-properties fo:break-before="column"/>
      <style:text-properties officeooo:rsid="000ba034" officeooo:paragraph-rsid="000ba034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officeooo:rsid="000c5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ubiKey</text:p>
      <text:p text:style-name="P1">Security Key C NFC</text:p>
      <text:p text:style-name="P1"><draw:frame text:anchor-type="paragraph" draw:z-index="0" draw:name="Shape1" draw:style-name="gr1" draw:text-style-name="P2" svg:width="1.378in" svg:height="1.3787in" svg:x="0.0193in" svg:y="0.502in"><draw:image xlink:href="Pictures/10001D51000003B8000003B8878BD65C.svg" xlink:type="simple" xlink:show="embed" xlink:actuate="onLoad" draw:mime-type="image/svg+xml"><text:p/></draw:image><draw:image xlink:href="Pictures/10000001000000430000004339A3319F.png" xlink:type="simple" xlink:show="embed" xlink:actuate="onLoad" draw:mime-type="image/png"/><loext:qrcode office:string-value="https://www.yubico.com/product/security-key-c-nfc-by-yubico-black/" loext:qrcode-errorcorrection="low" loext:qrcode-border="1" loext:qrcode-type="0"/></draw:frame><draw:frame text:anchor-type="paragraph" draw:z-index="1" draw:name="Shape2" draw:style-name="gr1" draw:text-style-name="P3" svg:width="1.3787in" svg:height="1.3787in" svg:x="1.7909in" svg:y="0.502in"><draw:image xlink:href="Pictures/100018090000034F0000034F966D8D32.svg" xlink:type="simple" xlink:show="embed" xlink:actuate="onLoad" draw:mime-type="image/svg+xml"><text:p/></draw:image><draw:image xlink:href="Pictures/100000010000003C0000003C0360612A.png" xlink:type="simple" xlink:show="embed" xlink:actuate="onLoad" draw:mime-type="image/png"/></draw:frame>$29<draw:frame draw:style-name="fr1" draw:name="Image1" text:anchor-type="char" svg:x="-0.0791in" svg:y="3.5535in" svg:width="3.5445in" svg:height="3.348in" draw:z-index="5"><draw:image xlink:href="Pictures/10000000000005DC000005DAD571ABA9.jpg" xlink:type="simple" xlink:show="embed" xlink:actuate="onLoad" draw:mime-type="image/jpeg"/></draw:frame></text:p>
      <text:p text:style-name="P4">YubiKey<text:line-break/>5C NFC</text:p>
      <text:p text:style-name="P1"><draw:frame text:anchor-type="paragraph" draw:z-index="2" draw:name="Shape3" draw:style-name="gr1" draw:text-style-name="P3" svg:width="1.3787in" svg:height="1.3787in" svg:x="1.8752in" svg:y="0.502in"><draw:image xlink:href="Pictures/100017A50000034F0000034FF1AF0D32.svg" xlink:type="simple" xlink:show="embed" xlink:actuate="onLoad" draw:mime-type="image/svg+xml"><text:p/></draw:image><draw:image xlink:href="Pictures/100000010000003C0000003C50204547.png" xlink:type="simple" xlink:show="embed" xlink:actuate="onLoad" draw:mime-type="image/png"/></draw:frame>$58</text:p>
      <text:p text:style-name="P4">YubiKey<text:line-break/>5C Nano</text:p>
      <text:p text:style-name="P1"><draw:frame text:anchor-type="paragraph" draw:z-index="3" draw:name="Shape4" draw:style-name="gr1" draw:text-style-name="P2" svg:width="1.3787in" svg:height="1.3787in" svg:x="1.8602in" svg:y="0.502in"><draw:image xlink:href="Pictures/1000174E0000034F0000034F392A9110.svg" xlink:type="simple" xlink:show="embed" xlink:actuate="onLoad" draw:mime-type="image/svg+xml"><text:p/></draw:image><draw:image xlink:href="Pictures/100000010000003C0000003C0DE93B56.png" xlink:type="simple" xlink:show="embed" xlink:actuate="onLoad" draw:mime-type="image/png"/><loext:qrcode office:string-value="https://www.yubico.com/product/yubikey-c-bio/" loext:qrcode-errorcorrection="low" loext:qrcode-border="1" loext:qrcode-type="0"/></draw:frame><draw:frame text:anchor-type="paragraph" draw:z-index="6" draw:name="Text Frame 1" draw:style-name="gr2" draw:text-style-name="P5" svg:width="4.528in" svg:height="1.1815in" svg:x="0.2862in" svg:y="5.7193in"><draw:text-box><text:p><text:span text:style-name="T1">YubiKey Legend:</text:span></text:p><text:p><text:span text:style-name="T1">“5”: Device has “Advanced Compatibility”</text:span></text:p><text:p><text:span text:style-name="T1">“C”: Device has a USB-C interface</text:span></text:p><text:p><text:span text:style-name="T1">“NFC”: Device will work wirelessly with most newer phones</text:span></text:p><text:p><text:span text:style-name="T1"/></text:p><text:p><text:span text:style-name="T1">“Bio” devices come with fingerprint readers</text:span></text:p></draw:text-box></draw:frame>$68</text:p>
      <text:p text:style-name="P4">YubiKey</text:p>
      <text:p text:style-name="P1">Bio C (FIDO Edition)</text:p>
      <text:p text:style-name="P1"><draw:frame text:anchor-type="paragraph" draw:z-index="4" draw:name="Shape5" draw:style-name="gr1" draw:text-style-name="P2" svg:width="1.378in" svg:height="1.3787in" svg:x="1.8465in" svg:y="0.502in"><draw:image xlink:href="Pictures/100016DB0000034F0000034F9CF4A46C.svg" xlink:type="simple" xlink:show="embed" xlink:actuate="onLoad" draw:mime-type="image/svg+xml"><text:p/></draw:image><draw:image xlink:href="Pictures/100000010000003C0000003C06E63C6B.png" xlink:type="simple" xlink:show="embed" xlink:actuate="onLoad" draw:mime-type="image/png"/><loext:qrcode office:string-value="https://thetis.io/products/fido2-fingerprint-key" loext:qrcode-errorcorrection="low" loext:qrcode-border="1" loext:qrcode-type="0"/></draw:frame>$98</text:p>
      <text:p text:style-name="P4">Thetis</text:p>
      <text:p text:style-name="P1">FIDO2 <text:span text:style-name="T2">BioFP</text:span></text:p>
      <text:p text:style-name="P1">$4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3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9:58:22.079669014</meta:creation-date>
    <dc:date>2026-01-15T10:22:17.795096970</dc:date>
    <meta:editing-duration>PT14H1M28S</meta:editing-duration>
    <meta:editing-cycles>8</meta:editing-cycles>
    <meta:generator>LibreOffice/25.8.4.2$Linux_X86_64 LibreOffice_project/580$Build-2</meta:generator>
    <meta:print-date>2026-01-14T20:43:48.120982109</meta:print-date>
    <meta:document-statistic meta:table-count="0" meta:image-count="1" meta:object-count="0" meta:page-count="1" meta:paragraph-count="13" meta:word-count="24" meta:character-count="113" meta:non-whitespace-character-count="102"/>
  </office:meta>
</office:document-meta>
</file>