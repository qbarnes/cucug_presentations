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D000001B9C4E2434C.png" manifest:media-type="image/png"/>
  <manifest:file-entry manifest:full-path="Pictures/1000DA300000466200001B633F136042.svg" manifest:media-type="image/svg+xml"/>
  <manifest:file-entry manifest:full-path="Pictures/10000000000007EC0000025370337D0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127cm" svg:stroke-color="#000000" draw:marker-start-width="0.381cm" draw:marker-end-width="0.381cm" draw:fill="solid" draw:fill-color="#ffffff" draw:textarea-horizontal-align="justify" draw:textarea-vertical-align="middle" draw:auto-grow-height="false" fo:min-height="2.925cm" fo:min-width="6.485cm" fo:padding-top="0.188cm" fo:padding-bottom="0.188cm" fo:padding-left="0.313cm" fo:padding-right="0.31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4.612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4.605cm" svg:x="1.4cm" svg:y="0.63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oftware-defined Radios</text:span></text:p>
            <text:p text:style-name="P1"><text:span text:style-name="T1">(SDRs)</text:span></text:p>
            <text:p text:style-name="P1"><text:span text:style-name="T1"/></text:p>
            <text:p text:style-name="P2"><text:span text:style-name="T2"/></text:p>
            <text:p text:style-name="P2"><text:span text:style-name="T2">CUCUG</text:span></text:p>
            <text:p text:style-name="P2"><text:span text:style-name="T2">Quentin Barnes</text:span></text:p>
            <text:p text:style-name="P2"><text:span text:style-name="T2">May 21, 2026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What’s a Radi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6">Converts an EM spectrum signal into data or voice</text:p>
              </text:list-item>
            </text:list>
            <text:list text:style-name="L4">
              <text:list-item>
                <text:p><text:span text:style-name="T3">Antenna </text:span><text:span text:style-name="T4">&gt; T</text:span><text:span text:style-name="T5">uner</text:span><text:span text:style-name="T4"> &gt; RF A</text:span><text:span text:style-name="T5">mp</text:span><text:span text:style-name="T4"> &gt; D</text:span><text:span text:style-name="T5">emodulator &gt; </text:span><text:span text:style-name="T4"><text:line-break/></text:span><text:span text:style-name="T4"> <text:s text:c="3"/>Audio amp &gt; Output/speaker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hat’s a <text:a xlink:href="https://en.wikipedia.org/wiki/Software-defined_radio" xlink:type="simple">Software-defined Radio</text:a>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ntenna &gt; <text:a xlink:href="https://en.wikipedia.org/wiki/Analog-to-digital_converter" xlink:type="simple">ADC</text:a><text:s/>&gt; <text:s text:c="25"/>&gt; Output/spkr</text:p>
              </text:list-item>
            </text:list>
            <text:p/>
            <text:p>Well, almost. <text:s/>Might have a bit of filtering and amplifiers between stages. </text:p>
            <text:p/>
            <text:p/>
            <text:p/>
          </draw:text-box>
        </draw:frame>
        <draw:custom-shape draw:style-name="gr2" draw:text-style-name="P8" draw:layer="layout" svg:width="6.985cm" svg:height="3.175cm" svg:x="12.065cm" svg:y="4.445cm">
          <text:p text:style-name="P5"><text:span text:style-name="T6">Magic Box</text:span></text:p>
          <text:p text:style-name="P5"><text:span text:style-name="T6">Running</text:span></text:p>
          <text:p text:style-name="P5"><text:span text:style-name="T6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a xlink:href="https://www.onelectrontech.com/rtl-sdr-v3-teardown-and-analysis/" xlink:type="simple">RTL-SDR v3 Guts</text:a></text:p>
          </draw:text-box>
        </draw:frame>
        <draw:frame draw:style-name="gr3" draw:text-style-name="P5" draw:layer="layout" svg:width="25.199cm" svg:height="7.392cm" svg:x="1.399cm" svg:y="4.556cm" presentation:class="graphic" presentation:user-transformed="true">
          <draw:image xlink:href="Pictures/10000000000007EC0000025370337D0A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Units I Have Tod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TL-SDR Blog v4</text:p>
              </text:list-item>
              <text:list-item>
                <text:p>Nooelec RTL-SDR v5</text:p>
              </text:list-item>
              <text:list-item>
                <text:p>Specs</text:p>
                <text:list>
                  <text:list-item>
                    <text:p>100 kHz to 1.75 GHz</text:p>
                  </text:list-item>
                  <text:list-item>
                    <text:p>~2.4 MHz bandwidth</text:p>
                  </text:list-item>
                  <text:list-item>
                    <text:p>ADC: 8-bit</text:p>
                  </text:list-item>
                  <text:list-item>
                    <text:p>Interface: USB 2.0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6.67cm" svg:height="13.335cm" svg:x="0.635cm" svg:y="1.27cm">
          <draw:image xlink:href="Pictures/1000DA300000466200001B633F136042.svg" xlink:type="simple" xlink:show="embed" xlink:actuate="onLoad" draw:mime-type="image/svg+xml">
            <text:p/>
          </draw:image>
          <draw:image xlink:href="Pictures/100000010000046D000001B9C4E2434C.png" xlink:type="simple" xlink:show="embed" xlink:actuate="onLoad" draw:mime-type="image/png"/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Much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id-Tier (~$100 - ~$400)</text:p>
                <text:list>
                  <text:list-item>
                    <text:p><text:a xlink:href="https://airspy.com/" xlink:type="simple">AirSpy</text:a></text:p>
                  </text:list-item>
                  <text:list-item>
                    <text:p><text:a xlink:href="https://greatscottgadgets.com/hackrf/one/" xlink:type="simple">HackRF One</text:a></text:p>
                  </text:list-item>
                  <text:list-item>
                    <text:p><text:a xlink:href="https://www.sdrplay.com/" xlink:type="simple">SDRplay</text:a></text:p>
                  </text:list-item>
                </text:list>
              </text:list-item>
              <text:list-item>
                <text:p>Budget (~$35 - ~$50)</text:p>
                <text:list>
                  <text:list-item>
                    <text:p><text:a xlink:href="https://www.nooelec.com/" xlink:type="simple">Nooelec NESDR SMArt v5</text:a></text:p>
                  </text:list-item>
                  <text:list-item>
                    <text:p><text:a xlink:href="https://www.rtl-sdr.com/" xlink:type="simple">RTL-SDR Blog</text:a><text:s/>v3/<text:a xlink:href="https://www.rtl-sdr.com/rtl-sdr-blog-v4-end-of-line/" xlink:type="simple">v4</text:a>/v4c/v4l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a xlink:href="https://www.rtl-sdr.com/about-rtl-sdr/" xlink:type="simple">But What Can I Do with It?</text:a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sten to just about any AM, FM, SW broadcast</text:p>
              </text:list-item>
              <text:list-item>
                <text:p>Capture <text:a xlink:href="https://www.youtube.com/watch?v=PWWGDL5tC_I" xlink:type="simple">live pictures from satellites</text:a></text:p>
              </text:list-item>
              <text:list-item>
                <text:p>Make a <text:a xlink:href="https://www.youtube.com/watch?v=UBrfqLc0E2U" xlink:type="simple">trunked software scanner</text:a></text:p>
              </text:list-item>
              <text:list-item>
                <text:p>Track airplanes overhead via their <text:a xlink:href="https://en.wikipedia.org/wiki/Automatic_Dependent_Surveillance–Broadcast" xlink:type="simple">ADS-B</text:a></text:p>
                <text:list>
                  <text:list-item>
                    <text:p>Log them on <text:a xlink:href="https://www.flightaware.com/" xlink:type="simple">FlightAware</text:a><text:s/>or <text:a xlink:href="https://www.flightradar24.com/" xlink:type="simple">FlightRadar24</text:a></text:p>
                  </text:list-item>
                  <text:list-item>
                    <text:p><text:a xlink:href="https://en.wikipedia.org/wiki/ElonJet" xlink:type="simple">Make Elon hate you!</text:a></text:p>
                  </text:list-item>
                </text:list>
              </text:list-item>
              <text:list-item>
                <text:p>Track <text:a xlink:href="https://www.weather.gov/ilx/ua-tour" xlink:type="simple">NWS</text:a><text:s/><text:a xlink:href="https://www.youtube.com/watch?v=gEu_gEVPNVQ" xlink:type="simple">weather ballons</text:a></text:p>
                <text:list>
                  <text:list-item>
                    <text:p>Log them on <text:a xlink:href="https://sondehub.org/" xlink:type="simple">Sondehub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oughts to Keep in Mi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nsitivity vs. Selectivity</text:p>
                <text:list>
                  <text:list-item>
                    <text:p>Block filters may be needed</text:p>
                  </text:list-item>
                </text:list>
              </text:list-item>
              <text:list-item>
                <text:p>Bandwidth</text:p>
                <text:list>
                  <text:list-item>
                    <text:p>SDR’s “window” into the RF spectrum</text:p>
                  </text:list-item>
                </text:list>
              </text:list-item>
              <text:list-item>
                <text:p>Analog-to-Digital Converter (ADC)</text:p>
                <text:list>
                  <text:list-item>
                    <text:p>More bits, more signal resolution</text:p>
                  </text:list-item>
                </text:list>
              </text:list-item>
              <text:list-item>
                <text:p>Antenna and placement is essential</text:p>
                <text:list>
                  <text:list-item>
                    <text:p>Bigger is <text:span text:style-name="T7">not</text:span> always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7" draw:layer="layout" svg:width="25.199cm" svg:height="14.612cm" svg:x="1.4cm" svg:y="0.628cm" presentation:class="subtitle" presentation:user-transformed="true">
          <draw:text-box>
            <text:p>Demo!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0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0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9T18:07:58.507347322</meta:creation-date>
    <dc:date>2026-05-21T16:23:13.601054612</dc:date>
    <meta:editing-duration>P1DT11H57M25S</meta:editing-duration>
    <meta:editing-cycles>30</meta:editing-cycles>
    <meta:generator>LibreOffice/26.2.3.2$Linux_X86_64 LibreOffice_project/620$Build-2</meta:generator>
    <meta:print-date>2026-05-21T09:58:23.579415874</meta:print-date>
    <meta:printed-by>PDF files</meta:printed-by>
    <meta:document-statistic meta:object-count="59"/>
  </office:meta>
</office:document-meta>
</file>