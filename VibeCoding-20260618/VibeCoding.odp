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4BB1DF1E09.png" manifest:media-type="image/png"/>
  <manifest:file-entry manifest:full-path="Pictures/1000269200000422000004220864370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4cm" fo:margin-bottom="0cm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Vibe Coding</text:span></text:p>
            <text:p><text:span text:style-name="T1"/></text:p>
            <text:p><text:span text:style-name="T1"/></text:p>
            <text:p text:style-name="P1"><text:span text:style-name="T2"/></text:p>
            <text:p text:style-name="P1"><text:span text:style-name="T2">CUCUG</text:span></text:p>
            <text:p text:style-name="P1"><text:span text:style-name="T2">Quentin Barnes</text:span></text:p>
            <text:p text:style-name="P1"><text:span text:style-name="T2">June 18, 2026</text:span></text:p>
          </draw:text-box>
        </draw:frame>
        <draw:frame draw:style-name="gr1" draw:text-style-name="P3" draw:layer="layout" svg:width="4cm" svg:height="4cm" svg:x="23.305cm" svg:y="11.24cm">
          <draw:image xlink:href="Pictures/10002692000004220000042208643708.svg" xlink:type="simple" xlink:show="embed" xlink:actuate="onLoad" draw:mime-type="image/svg+xml">
            <text:p/>
          </draw:image>
          <draw:image xlink:href="Pictures/100000010000004B0000004BB1DF1E09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Vibe Co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Vibe_coding" xlink:type="simple">Vibe Coding</text:a><text:s/>is letting AI do all the development</text:p>
                <text:list>
                  <text:list-item>
                    <text:p>No knowledge of computer languages needed</text:p>
                  </text:list-item>
                  <text:list-item>
                    <text:p>Just describe what you want in English</text:p>
                  </text:list-item>
                  <text:list-item>
                    <text:p>Sit back and watch it do it all the 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6"><text:a xlink:href="https://www.anthropic.com/claude/fable" xlink:type="simple">Fable 5</text:a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talk was going to be using Anthropic’s Fable 5</text:p>
              </text:list-item>
              <text:list-item>
                <text:p>Critiques its own work</text:p>
              </text:list-item>
              <text:list-item>
                <text:p>Reads and understands documents</text:p>
                <text:list>
                  <text:list-item>
                    <text:p>Text, charts, tables</text:p>
                  </text:list-item>
                </text:list>
              </text:list-item>
              <text:list-item>
                <text:p><text:a xlink:href="https://www.anthropic.com/news/fable-mythos-access" xlink:type="simple">Outlawed</text:a><text:s/>by the current administration</text:p>
                <text:list>
                  <text:list-item>
                    <text:p><text:a xlink:href="https://www.yahoo.com/news/politics/articles/fix-code-three-little-words-183543611.html" xlink:type="simple">“Fix this code” is a munition</text:a></text:p>
                  </text:list-item>
                </text:list>
              </text:list-item>
              <text:list-item>
                <text:p text:style-name="P7">But other models can be good too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Short Side Ven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Model_Context_Protocol" xlink:type="simple">Model Context Protocol</text:a><text:s/>(MCP)</text:p>
                <text:list>
                  <text:list-item>
                    <text:p>A standard for AIs to talk with existing software/systems</text:p>
                  </text:list-item>
                </text:list>
              </text:list-item>
              <text:list-item>
                <text:p><text:a xlink:href="https://github.com/CursorTouch/Windows-MCP" xlink:type="simple">Windows MCP</text:a></text:p>
                <text:list>
                  <text:list-item>
                    <text:p>Use prompts control Microsoft Windows</text:p>
                  </text:list-item>
                </text:list>
              </text:list-item>
              <text:list-item>
                <text:p><text:a xlink:href="https://forscan.org/home.html" xlink:type="simple">FORScan</text:a></text:p>
                <text:list>
                  <text:list-item>
                    <text:p>OBD2 reader with manufacturer-specific codes and modules</text:p>
                  </text:list-item>
                  <text:list-item>
                    <text:p text:style-name="P8">Supports Ford, Mazda, Lincoln, and Mercur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irst Demo! (Sort of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ose a simple program most know (Pong)</text:p>
              </text:list-item>
              <text:list-item>
                <text:p>Used <text:a xlink:href="https://claude.com/product/claude-code" xlink:type="simple">Claude Code</text:a><text:s/>for vibing</text:p>
                <text:list>
                  <text:list-item>
                    <text:p><text:a xlink:href="https://www.anthropic.com/news/claude-sonnet-4-6" xlink:type="simple">Sonnet 4.6</text:a></text:p>
                    <text:list>
                      <text:list-item>
                        <text:p>least expensive/least capable CC model</text:p>
                      </text:list-item>
                    </text:list>
                  </text:list-item>
                  <text:list-item>
                    <text:p>Desktop app available for MacOS/Windows</text:p>
                  </text:list-item>
                  <text:list-item>
                    <text:p>Linux uses a command line interface</text:p>
                  </text:list-item>
                </text:list>
              </text:list-item>
              <text:list-item>
                <text:p><text:a xlink:href="https://github.com/qbarnes/cucug_presentations/blob/master/VibeCoding-20260618/pong/README.md" xlink:type="simple">All done in one pass</text:a><text:s/>(one try, no do-overs)</text:p>
                <text:list>
                  <text:list-item>
                    <text:p>Used about 5% of my weekly limi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cond Dem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worldofclaudecraft.com/" xlink:type="simple">World of ClaudeCraft</text:a></text:p>
              </text:list-item>
              <text:list-item>
                <text:p>Vibe Coded using Fable 5 (before illegal)</text:p>
              </text:list-item>
              <text:list-item>
                <text:p>Author used less than $100 of Fable’s time</text:p>
                <text:list>
                  <text:list-item>
                    <text:p>One month of max plan is $100</text:p>
                  </text:list-item>
                </text:list>
              </text:list-item>
              <text:list-item>
                <text:p><text:a xlink:href="https://github.com/levy-street/world-of-claudecraft" xlink:type="simple">Repo</text:a><text:s/>on GitHub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ant to try out CC yourself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aude Code does require paid service</text:p>
                <text:list>
                  <text:list-item>
                    <text:p>I’m at Claude’s $20/mo plan which includes CC</text:p>
                  </text:list-item>
                </text:list>
              </text:list-item>
              <text:list-item>
                <text:p>I have a few free 7-day passes for CC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8:07:58.507347322</meta:creation-date>
    <dc:date>2026-06-19T06:33:32.303312899</dc:date>
    <meta:editing-duration>P2DT13H2M11S</meta:editing-duration>
    <meta:editing-cycles>66</meta:editing-cycles>
    <meta:generator>LibreOffice/26.2.4.2$Linux_X86_64 LibreOffice_project/620$Build-2</meta:generator>
    <meta:print-date>2026-06-19T06:33:45.036026013</meta:print-date>
    <meta:printed-by>PDF files</meta:printed-by>
    <meta:document-statistic meta:object-count="49"/>
  </office:meta>
</office:document-meta>
</file>