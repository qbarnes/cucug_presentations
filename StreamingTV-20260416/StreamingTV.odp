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8000000289999788D.png" manifest:media-type="image/png"/>
  <manifest:file-entry manifest:full-path="Pictures/1000267E0000042200000422CC6BA87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4.61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Free and Cheap</text:span><text:span text:style-name="T1"><text:line-break/></text:span><text:span text:style-name="T1">Streaming Television</text:span></text:p>
            <text:p><text:span text:style-name="T1">(IPTV)</text:span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April 16, 2026</text:span></text:p>
          </draw:text-box>
        </draw:frame>
        <draw:frame draw:style-name="gr1" draw:text-style-name="P3" draw:layer="layout" svg:width="4cm" svg:height="4cm" svg:x="23.305cm" svg:y="11.24cm">
          <draw:image xlink:href="Pictures/1000267E0000042200000422CC6BA870.svg" xlink:type="simple" xlink:show="embed" xlink:actuate="onLoad" draw:mime-type="image/svg+xml">
            <text:p/>
          </draw:image>
          <draw:image xlink:href="Pictures/1000000100000028000000289999788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ll</text:p>
              </text:list-item>
              <text:list-item>
                <text:p>Research and Objectives</text:p>
              </text:list-item>
              <text:list-item>
                <text:p>Defini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How many people here watch streaming services on their television</text:p>
              <text:p><text:s text:c="2"/>or computer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You Ne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Internet Connection</text:p>
              </text:list-item>
              <text:list-item>
                <text:p>An IPTV Player (h/w box, browser, or app)</text:p>
              </text:list-item>
              <text:list-item>
                <text:p>IPTV service provider(s)</text:p>
              </text:list-item>
              <text:list-item>
                <text:p>Optional</text:p>
                <text:list>
                  <text:list-item>
                    <text:p>Electronic Programming Guide</text:p>
                  </text:list-item>
                  <text:list-item>
                    <text:p>Digital Video 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actors to Weig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nthly/reoccurring fees vs. free</text:p>
              </text:list-item>
              <text:list-item>
                <text:p>Ad-free vs. ad-supported (or both)</text:p>
                <text:list>
                  <text:list-item>
                    <text:p>Are ads skippable?</text:p>
                  </text:list-item>
                </text:list>
              </text:list-item>
              <text:list-item>
                <text:p>Live vs. on-demand content</text:p>
                <text:list>
                  <text:list-item>
                    <text:p>Recordable?</text:p>
                  </text:list-item>
                </text:list>
              </text:list-item>
              <text:list-item>
                <text:p>How often does content change/expire</text:p>
              </text:list-item>
              <text:list-item>
                <text:p>Player and EPG Ecosyst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pensive, Ad-fre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 going to waste time on these</text:p>
              </text:list-item>
              <text:list-item>
                <text:p>Everyone knows these:</text:p>
                <text:list>
                  <text:list-item>
                    <text:p>Netflix, Disney+, Paramount+, Hulu+Live, Sling, YouTube TV, Peacock, Amazon Prime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eap(er), Provider Ad-fre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frndlytv.com/" xlink:type="simple">Frndly TV</text:a><text:s/>(~$7/mo)</text:p>
              </text:list-item>
              <text:list-item>
                <text:p><text:a xlink:href="https://www.philo.com/" xlink:type="simple">Philo TV</text:a><text:s/>($25-$33/mo)</text:p>
              </text:list-item>
              <text:list-item>
                <text:p>“Ahoy, Matey!”</text:p>
                <text:list>
                  <text:list-item>
                    <text:p>Be careful of services that offer IPTV but at a very low cost</text:p>
                  </text:list-item>
                  <text:list-item>
                    <text:p>These can pirate content, offering for a one-time or very low monthly fee</text:p>
                  </text:list-item>
                  <text:list-item>
                    <text:p>If a streaming service doesn’t list its channels or doesn’t have an iOS player, likely pirated <text:s/>(<text:a xlink:href="https://www.g2g.com/search?q=iptv" xlink:type="simple">g2g</text:a>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ree, Ad-Support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tubitv.com/" xlink:type="simple">Tubi</text:a></text:p>
              </text:list-item>
              <text:list-item>
                <text:p><text:a xlink:href="https://pluto.tv/" xlink:type="simple">Pluto TV</text:a></text:p>
              </text:list-item>
              <text:list-item>
                <text:p><text:a xlink:href="https://therokuchannel.roku.com/" xlink:type="simple">The Roku Channel</text:a></text:p>
              </text:list-item>
              <text:list-item>
                <text:p><text:a xlink:href="https://plex.tv/" xlink:type="simple">Plex</text:a></text:p>
              </text:list-item>
              <text:list-item>
                <text:p><text:a xlink:href="https://airy.tv/" xlink:type="simple">Airy TV</text:a></text:p>
              </text:list-item>
              <text:list-item>
                <text:p>Free tiers: <text:a xlink:href="https://www.directv.com/deals/" xlink:type="simple">DirecTV</text:a>, <text:a xlink:href="https://amazon.com/freevee" xlink:type="simple">Amazon Freevee</text:a>, <text:a xlink:href="https://www.philo.com/go/free-channels" xlink:type="simple">Philo TV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ree, Ad-fre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this legit?</text:p>
                <text:list>
                  <text:list-item>
                    <text:p>Yes! If you live in a public library district</text:p>
                  </text:list-item>
                </text:list>
              </text:list-item>
              <text:list-item>
                <text:p><text:a xlink:href="https://www.kanopy.com/" xlink:type="simple">Kanopy</text:a></text:p>
                <text:list>
                  <text:list-item>
                    <text:p>On-demand movies, TV shows, educational videos and documentaries</text:p>
                  </text:list-item>
                </text:list>
              </text:list-item>
              <text:list-item>
                <text:p><text:a xlink:href="https://www.hoopladigital.com/" xlink:type="simple">Hoopla</text:a></text:p>
                <text:list>
                  <text:list-item>
                    <text:p>On demand movies, TV shows, audiobooks, eBooks, comics, manga, and musi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Do You Find Stuff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justwatch.com/" xlink:type="simple">JustWatch</text:a><text:s/>and <text:a xlink:href="https://reelgood.com/" xlink:type="simple">Reelgood</text:a></text:p>
                <text:list>
                  <text:list-item>
                    <text:p>But these are limited and a closed ecosystem</text:p>
                  </text:list-item>
                </text:list>
              </text:list-item>
              <text:list-item>
                <text:p>EPGs</text:p>
                <text:list>
                  <text:list-item>
                    <text:p>Can blend multiple sources and private collection</text:p>
                  </text:list-item>
                  <text:list-item>
                    <text:p><text:a xlink:href="https://www.open-epg.com/" xlink:type="simple">Open EPG</text:a></text:p>
                  </text:list-item>
                  <text:list-item>
                    <text:p><text:a xlink:href="https://github.com/iptv-org/" xlink:type="simple">IPTV-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5" draw:layer="layout" svg:width="25.199cm" svg:height="14.612cm" svg:x="1.4cm" svg:y="0.628cm" presentation:class="subtitle" presentation:user-transformed="true">
          <draw:text-box>
            <text:p>Demo/Discus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1:03:40.692502105</meta:creation-date>
    <dc:date>2026-04-16T17:43:21.537541331</dc:date>
    <meta:editing-duration>PT3H38M38S</meta:editing-duration>
    <meta:editing-cycles>19</meta:editing-cycles>
    <meta:generator>LibreOffice/25.8.6.2$Linux_X86_64 LibreOffice_project/580$Build-2</meta:generator>
    <meta:print-date>2026-04-16T14:56:52.709139739</meta:print-date>
    <meta:printed-by>PDF files</meta:printed-by>
    <meta:document-statistic meta:object-count="60"/>
  </office:meta>
</office:document-meta>
</file>